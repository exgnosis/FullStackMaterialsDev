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600000132253A835D.png" manifest:media-type="image/png"/>
  <manifest:file-entry manifest:full-path="Pictures/10000001000002260000014AB3DBE57C.png" manifest:media-type="image/png"/>
  <manifest:file-entry manifest:full-path="Pictures/100000010000025C00000083BD4FA079.png" manifest:media-type="image/png"/>
  <manifest:file-entry manifest:full-path="Pictures/100000010000023D000001B1C10CC3AF.png" manifest:media-type="image/png"/>
  <manifest:file-entry manifest:full-path="Pictures/10000001000000F1000000A0F5D424A0.png" manifest:media-type="image/png"/>
  <manifest:file-entry manifest:full-path="Pictures/1000000100000241000002509C8BCF87.png" manifest:media-type="image/png"/>
  <manifest:file-entry manifest:full-path="Pictures/10000001000003D4000001979678A49F.png" manifest:media-type="image/png"/>
  <manifest:file-entry manifest:full-path="Pictures/10000001000001D2000001B53DA1E969.png" manifest:media-type="image/png"/>
  <manifest:file-entry manifest:full-path="Pictures/100000010000025D0000005F39F89C1F.png" manifest:media-type="image/png"/>
  <manifest:file-entry manifest:full-path="Pictures/10000001000006050000092C193E0F15.png" manifest:media-type="image/png"/>
  <manifest:file-entry manifest:full-path="Pictures/10000001000001D200000130CDC406D9.png" manifest:media-type="image/png"/>
  <manifest:file-entry manifest:full-path="Pictures/10000000000007800000043862755C2A.png" manifest:media-type="image/png"/>
  <manifest:file-entry manifest:full-path="Pictures/10000001000002770000005F4FB18282.png" manifest:media-type="image/png"/>
  <manifest:file-entry manifest:full-path="Pictures/10000001000001770000027720CAD079.png" manifest:media-type="image/png"/>
  <manifest:file-entry manifest:full-path="Pictures/10000001000002140000024C41B39C5D.png" manifest:media-type="image/png"/>
  <manifest:file-entry manifest:full-path="Pictures/10000001000002E4000001027417667B.png" manifest:media-type="image/png"/>
  <manifest:file-entry manifest:full-path="Pictures/100000010000031A000002C347F32DFB.png" manifest:media-type="image/png"/>
  <manifest:file-entry manifest:full-path="Pictures/10000001000001F2000001A4031C86DA.png" manifest:media-type="image/png"/>
  <manifest:file-entry manifest:full-path="Pictures/100000010000026B00000197B92AF89A.png" manifest:media-type="image/png"/>
  <manifest:file-entry manifest:full-path="Pictures/1000000100000236000001F45D6F699E.png" manifest:media-type="image/png"/>
  <manifest:file-entry manifest:full-path="Pictures/10000001000001EC0000011A81A8514E.png" manifest:media-type="image/png"/>
  <manifest:file-entry manifest:full-path="Pictures/1000000100000168000000DD1DB1F286.png" manifest:media-type="image/png"/>
  <manifest:file-entry manifest:full-path="Pictures/10000001000001DA000001DA6425D580.png" manifest:media-type="image/png"/>
  <manifest:file-entry manifest:full-path="Pictures/100000010000031E000002A2236B3394.png" manifest:media-type="image/png"/>
  <manifest:file-entry manifest:full-path="Pictures/10000001000002EC00000158B8655FA2.png" manifest:media-type="image/png"/>
  <manifest:file-entry manifest:full-path="Pictures/1000000100000279000001CDA5C8448D.png" manifest:media-type="image/png"/>
  <manifest:file-entry manifest:full-path="Pictures/100000010000031E000002A2FCBFB538.png" manifest:media-type="image/png"/>
  <manifest:file-entry manifest:full-path="Pictures/1000000100000221000000B53B2766B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eelawadee" svg:font-family="Leelawadee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draw:fill="bitmap" draw:fill-image-name="Bitmap_20_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319cm" loext:decorative="false"/>
      <style:paragraph-properties style:writing-mode="lr-tb"/>
    </style:style>
    <style:style style:name="pr1" style:family="presentation" style:parent-style-name="One_20_Up_20_Conten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One_20_Up_20_Content-title">
      <style:graphic-properties fo:min-height="1.57cm" loext:decorative="false"/>
      <style:paragraph-properties style:writing-mode="lr-tb"/>
    </style:style>
    <style:style style:name="pr3" style:family="presentation" style:parent-style-name="One_20_Up_20_Content-outline1">
      <style:graphic-properties fo:min-height="12.293cm" loext:decorative="false"/>
      <style:paragraph-properties style:writing-mode="lr-tb"/>
    </style:style>
    <style:style style:name="pr4" style:family="presentation" style:parent-style-name="Two-thirds-title">
      <style:graphic-properties draw:auto-grow-height="true" fo:min-height="1.57cm" loext:decorative="false"/>
      <style:paragraph-properties style:writing-mode="lr-tb"/>
    </style:style>
    <style:style style:name="pr5" style:family="presentation" style:parent-style-name="Two-thirds-outline1">
      <style:graphic-properties fo:min-height="10.798cm" loext:decorative="false"/>
      <style:paragraph-properties style:writing-mode="lr-tb"/>
    </style:style>
    <style:style style:name="pr6" style:family="presentation" style:parent-style-name="Two-thirds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Two_20_left_20_Conent-title">
      <style:graphic-properties draw:auto-grow-height="true" fo:min-height="1.57cm" loext:decorative="false"/>
      <style:paragraph-properties style:writing-mode="lr-tb"/>
    </style:style>
    <style:style style:name="pr8" style:family="presentation" style:parent-style-name="Two_20_left_20_Conent-outline1">
      <style:graphic-properties fo:min-height="10.798cm" loext:decorative="false"/>
      <style:paragraph-properties style:writing-mode="lr-tb"/>
    </style:style>
    <style:style style:name="pr9" style:family="presentation" style:parent-style-name="Two_20_left_20_Conen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loext:graphic-properties draw:fill="none" draw:fill-color="#ffffff"/>
      <style:text-properties fo:color="#ffff38" loext:opacity="100%" fo:font-size="18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604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38" loext:opacity="100%" fo:font-size="18pt"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2a6099" loext:opacity="100%"/>
    </style:style>
    <style:style style:name="T5" style:family="text">
      <style:text-properties fo:color="#004586" loext:opacity="100%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Up_20_Content" presentation:presentation-page-layout-name="AL1T0">
        <office:forms form:automatic-focus="false" form:apply-design-mode="false"/>
        <draw:frame draw:style-name="gr1" draw:text-style-name="P1" draw:layer="layout" svg:width="16cm" svg:height="1.5cm" svg:x="1.5cm" svg:y="2cm">
          <draw:text-box>
            <text:p><text:span text:style-name="T1">Java Full Stack Development</text:span></text:p>
          </draw:text-box>
        </draw:frame>
        <draw:frame draw:style-name="gr2" draw:text-style-name="P2" draw:layer="layout" svg:width="14cm" svg:height="1.673cm" svg:x="1.5cm" svg:y="3.7cm">
          <draw:text-box>
            <text:p><text:span text:style-name="T2">5. IntelliJ Setup and Naviga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One_20_Up_20_Content" presentation:presentation-page-layout-name="AL2T1">
        <office:forms form:automatic-focus="false" form:apply-design-mode="false"/>
        <draw:frame presentation:style-name="pr2" draw:layer="layout" svg:width="26.54cm" svg:height="1.57cm" svg:x="2.46cm" svg:y="1.02cm" presentation:class="title">
          <draw:text-box>
            <text:p>Module Topics</text:p>
          </draw:text-box>
        </draw:frame>
        <draw:frame presentation:style-name="pr3" draw:layer="layout" svg:width="30.478cm" svg:height="12.543cm" svg:x="1.693cm" svg:y="4.457cm" presentation:class="outline">
          <draw:text-box>
            <text:list text:style-name="L2">
              <text:list-item>
                <text:p>Introduction to IntelliJ</text:p>
              </text:list-item>
              <text:list-item>
                <text:p>Project setup and configuration</text:p>
              </text:list-item>
              <text:list-item>
                <text:p>Navigation in a large codebase</text:p>
              </text:list-item>
              <text:list-item>
                <text:p>Code Inspections and intentions</text:p>
              </text:list-item>
              <text:list-item>
                <text:p>Refactoring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Two-thirds" presentation:presentation-page-layout-name="AL2T1">
        <office:forms form:automatic-focus="false" form:apply-design-mode="false"/>
        <draw:frame presentation:style-name="pr4" draw:layer="layout" svg:width="26.54cm" svg:height="1.57cm" svg:x="2.46cm" svg:y="1.02cm" presentation:class="title">
          <draw:text-box>
            <text:p>IntelliJ</text:p>
          </draw:text-box>
        </draw:frame>
        <draw:frame presentation:style-name="pr5" draw:layer="layout" svg:width="18.807cm" svg:height="12.543cm" svg:x="1.693cm" svg:y="4.457cm" presentation:class="outline">
          <draw:text-box>
            <text:list text:style-name="L2">
              <text:list-item>
                <text:p text:style-name="P4">IntelliJ IDEA is a polyglot IDE developed by JetBrains</text:p>
                <text:list>
                  <text:list-item>
                    <text:p>Java native support is built into the core engine </text:p>
                  </text:list-item>
                  <text:list-item>
                    <text:p>Tools operate on a fully resolved semantic model of the code, not a best-effort parse</text:p>
                    <text:list>
                      <text:list-item>
                        <text:p>For example: static analysis tools, refactoring engine, code generation, and debugger</text:p>
                      </text:list-item>
                      <text:list-item>
                        <text:p>Every inspection, 'Extract Method', <text:s/>'Find Usages' execution operates against the real type graph of a project</text:p>
                      </text:list-item>
                    </text:list>
                  </text:list-item>
                  <text:list-item>
                    <text:p>VS Code uses language server extensions</text:p>
                    <text:list>
                      <text:list-item>
                        <text:p>Provides language server protocol (LSP) support</text:p>
                      </text:list-item>
                      <text:list-item>
                        <text:p>Architecturally more limited</text:p>
                      </text:list-item>
                      <text:list-item>
                        <text:p>Especially for large-scale refactoring, Spring-specific inspection, and deep framework integr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9.5cm" svg:height="9.5cm" svg:x="22.5cm" svg:y="6cm">
          <draw:image xlink:href="Pictures/10000001000001DA000001DA6425D58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<text:s/>Project Setup</text:p>
          </draw:text-box>
        </draw:frame>
        <draw:frame presentation:style-name="pr8" draw:layer="layout" svg:width="13.807cm" svg:height="12.543cm" svg:x="1.693cm" svg:y="4.457cm" presentation:class="outline">
          <draw:text-box>
            <text:list text:style-name="L2">
              <text:list-item>
                <text:p text:style-name="P4">IntelliJ IDEA organizes work on a project basis</text:p>
              </text:list-item>
              <text:list-item>
                <text:p text:style-name="P4">Setting are set up at the IDE level</text:p>
                <text:list>
                  <text:list-item>
                    <text:p>These are defaults for each project</text:p>
                  </text:list-item>
                  <text:list-item>
                    <text:p>These can be overridden for project specific settings</text:p>
                  </text:list-item>
                </text:list>
              </text:list-item>
            </text:list>
            <text:p/>
            <text:p/>
            <text:p><text:span text:style-name="T3"/></text:p>
          </draw:text-box>
        </draw:frame>
        <draw:frame draw:style-name="gr4" draw:text-style-name="P5" draw:layer="layout" svg:width="15.222cm" svg:height="7cm" svg:x="17.278cm" svg:y="6cm">
          <draw:image xlink:href="Pictures/10000001000002EC00000158B8655FA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<text:s/>Project Setup</text:p>
          </draw:text-box>
        </draw:frame>
        <draw:frame presentation:style-name="pr8" draw:layer="layout" svg:width="13.807cm" svg:height="12.543cm" svg:x="1.693cm" svg:y="4.457cm" presentation:class="outline">
          <draw:text-box>
            <text:list text:style-name="L2">
              <text:list-item>
                <text:p text:style-name="P4">There are two JVMs used</text:p>
                <text:list>
                  <text:list-item>
                    <text:p>IntelliJ is a Java application so the system JVM is used, in this case Java 25 to run the IDE</text:p>
                  </text:list-item>
                  <text:list-item>
                    <text:p>The project JVM is used to compile and run the code in the project which may be any other Java version</text:p>
                    <text:list>
                      <text:list-item>
                        <text:p>In the screenshot, the project JVM is Java 17</text:p>
                      </text:list-item>
                    </text:list>
                  </text:list-item>
                </text:list>
              </text:list-item>
              <text:list-item>
                <text:p>The default build tool is selected</text:p>
                <text:list>
                  <text:list-item>
                    <text:p>We will be using Maven for this class</text:p>
                  </text:list-item>
                </text:list>
              </text:list-item>
            </text:list>
            <text:p/>
            <text:p/>
            <text:p><text:span text:style-name="T3"/></text:p>
          </draw:text-box>
        </draw:frame>
        <draw:frame draw:style-name="gr4" draw:text-style-name="P5" draw:layer="layout" svg:width="15.643cm" svg:height="13.929cm" svg:x="16.857cm" svg:y="4cm">
          <draw:image xlink:href="Pictures/100000010000031A000002C347F32DF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<text:s/>Project Setup</text:p>
          </draw:text-box>
        </draw:frame>
        <draw:frame presentation:style-name="pr8" draw:layer="layout" svg:width="13.807cm" svg:height="12.543cm" svg:x="1.693cm" svg:y="4.457cm" presentation:class="outline">
          <draw:text-box>
            <text:list text:style-name="L2">
              <text:list-item>
                <text:p text:style-name="P4">The project shown was generated by the sample code option </text:p>
                <text:list>
                  <text:list-item>
                    <text:p>The directory structure is a standard Maven project structure</text:p>
                  </text:list-item>
                  <text:list-item>
                    <text:p>The <text:span text:style-name="T4">src</text:span> folder contains three subfolders</text:p>
                    <text:list>
                      <text:list-item>
                        <text:p>The <text:span text:style-name="T4">main</text:span> folder that contains the code</text:p>
                      </text:list-item>
                      <text:list-item>
                        <text:p>The <text:span text:style-name="T4">test</text:span> folder that contains the unit tests</text:p>
                      </text:list-item>
                      <text:list-item>
                        <text:p>The <text:span text:style-name="T4">resources</text:span> folder that contains other project artifacts like config files, images, etc</text:p>
                      </text:list-item>
                    </text:list>
                  </text:list-item>
                  <text:list-item>
                    <text:p>The compiled and packaged code is in the <text:span text:style-name="T4">target</text:span> directory</text:p>
                  </text:list-item>
                  <text:list-item>
                    <text:p>The <text:span text:style-name="T4">External Libraries</text:span> are all of the class libraries used in the project</text:p>
                  </text:list-item>
                </text:list>
              </text:list-item>
            </text:list>
            <text:p/>
            <text:p><text:span text:style-name="T3"/></text:p>
          </draw:text-box>
        </draw:frame>
        <draw:frame draw:style-name="gr4" draw:text-style-name="P5" draw:layer="layout" svg:width="13.173cm" svg:height="11.11cm" svg:x="18.327cm" svg:y="4.39cm">
          <draw:image xlink:href="Pictures/10000001000001F2000001A4031C86D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<text:s/>Pom.xml File</text:p>
          </draw:text-box>
        </draw:frame>
        <draw:frame presentation:style-name="pr8" draw:layer="layout" svg:width="13.807cm" svg:height="12.543cm" svg:x="1.693cm" svg:y="4.457cm" presentation:class="outline">
          <draw:text-box>
            <text:list text:style-name="L2">
              <text:list-item>
                <text:p text:style-name="P4">The <text:span text:style-name="T4">pom.xm</text:span>l file is the single source of truth for the project</text:p>
                <text:list>
                  <text:list-item>
                    <text:p>Note that pins the Java version to 17</text:p>
                  </text:list-item>
                  <text:list-item>
                    <text:p>And pins the file encoding to UTF-8</text:p>
                  </text:list-item>
                </text:list>
              </text:list-item>
            </text:list>
            <text:p><text:span text:style-name="T3"/></text:p>
          </draw:text-box>
        </draw:frame>
        <draw:frame draw:style-name="gr4" draw:text-style-name="P5" draw:layer="layout" svg:width="16.745cm" svg:height="12.194cm" svg:x="15.755cm" svg:y="4.306cm">
          <draw:image xlink:href="Pictures/1000000100000279000001CDA5C8448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<text:s/>Scratches</text:p>
          </draw:text-box>
        </draw:frame>
        <draw:frame presentation:style-name="pr8" draw:layer="layout" svg:width="13.807cm" svg:height="12.543cm" svg:x="1.693cm" svg:y="4.457cm" presentation:class="outline">
          <draw:text-box>
            <text:list text:style-name="L2">
              <text:list-item>
                <text:p text:style-name="P4">The <text:span text:style-name="T4">Scratches</text:span> folder holds temporary, project-independent files that are outside the source tree</text:p>
              </text:list-item>
              <text:list-item>
                <text:p>A scratch file is a throwaway editor buffer that supports full language features </text:p>
                <text:list>
                  <text:list-item>
                    <text:p>Scratch files are not part of any project</text:p>
                  </text:list-item>
                  <text:list-item>
                    <text:p>Stored globally in your IntelliJ config directory</text:p>
                  </text:list-item>
                  <text:list-item>
                    <text:p>The scratch file is visible in other projects</text:p>
                    <text:p/>
                  </text:list-item>
                </text:list>
              </text:list-item>
            </text:list>
            <text:p/>
            <text:p><text:span text:style-name="T3"/></text:p>
          </draw:text-box>
        </draw:frame>
        <draw:frame draw:style-name="gr4" draw:text-style-name="P5" draw:layer="layout" svg:width="13.173cm" svg:height="11.11cm" svg:x="18.327cm" svg:y="4.39cm">
          <draw:image xlink:href="Pictures/10000001000001F2000001A4031C86D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<text:s/>Consoles</text:p>
          </draw:text-box>
        </draw:frame>
        <draw:frame presentation:style-name="pr8" draw:layer="layout" svg:width="13.807cm" svg:height="12.543cm" svg:x="1.693cm" svg:y="4.457cm" presentation:class="outline">
          <draw:text-box>
            <text:list text:style-name="L2">
              <text:list-item>
                <text:p text:style-name="P4">The <text:span text:style-name="T4">Consoles</text:span> are saved interactive console sessions</text:p>
              </text:list-item>
              <text:list-item>
                <text:p text:style-name="P4">There are three types used in this course</text:p>
                <text:list>
                  <text:list-item>
                    <text:p>Database consoles</text:p>
                    <text:list>
                      <text:list-item>
                        <text:p>An .sql file that IntelliJ saves so <text:s/>queries are not lost when the IDE is closed</text:p>
                      </text:list-item>
                    </text:list>
                  </text:list-item>
                  <text:list-item>
                    <text:p>HTTP client consoles</text:p>
                    <text:list>
                      <text:list-item>
                        <text:p>Unsaved .http request files land here before they are explicitly saved to the project</text:p>
                      </text:list-item>
                    </text:list>
                  </text:list-item>
                  <text:list-item>
                    <text:p>Language consoles</text:p>
                    <text:list>
                      <text:list-item>
                        <text:p>When a Groovy or other REPL-style console is opened, <text:s/>the session is stored here</text:p>
                      </text:list-item>
                    </text:list>
                  </text:list-item>
                </text:list>
              </text:list-item>
            </text:list>
            <text:p><text:span text:style-name="T3"/></text:p>
          </draw:text-box>
        </draw:frame>
        <draw:frame draw:style-name="gr4" draw:text-style-name="P5" draw:layer="layout" svg:width="7.919cm" svg:height="13.326cm" svg:x="20cm" svg:y="4.174cm">
          <draw:image xlink:href="Pictures/10000001000001770000027720CAD07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Auto-Import</text:p>
          </draw:text-box>
        </draw:frame>
        <draw:frame presentation:style-name="pr8" draw:layer="layout" svg:width="13.807cm" svg:height="12.543cm" svg:x="1.693cm" svg:y="4.457cm" presentation:class="outline">
          <draw:text-box>
            <text:list text:style-name="L2">
              <text:list-item>
                <text:p text:style-name="P4">Maven auto-import</text:p>
                <text:list>
                  <text:list-item>
                    <text:p>IntelliJ can watch the pom.xm file</text:p>
                    <text:list>
                      <text:list-item>
                        <text:p>Can automatically synchronize its internal project model whenever a dependency is modified</text:p>
                      </text:list-item>
                      <text:list-item>
                        <text:p>Without this, manually triggering <text:span text:style-name="T4"><text:s/>Reload Project</text:span> every the pom.xml is edited</text:p>
                      </text:list-item>
                    </text:list>
                  </text:list-item>
                  <text:list-item>
                    <text:p>This has to be turned on in the settings as shown here</text:p>
                  </text:list-item>
                  <text:list-item>
                    <text:p>Triggered every time a Spring Boot starter, a dependency added, or change is made to a <text:s/>a plugin version</text:p>
                  </text:list-item>
                  <text:list-item>
                    <text:p>Without auto-import phantom compilation errors can occur that are simply stale classpath entries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972cm" svg:height="13.226cm" svg:x="16.528cm" svg:y="3.774cm">
          <draw:image xlink:href="Pictures/1000000100000236000001F45D6F69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File Encoding</text:p>
          </draw:text-box>
        </draw:frame>
        <draw:frame presentation:style-name="pr8" draw:layer="layout" svg:width="13.807cm" svg:height="12.543cm" svg:x="1.693cm" svg:y="4.457cm" presentation:class="outline">
          <draw:text-box>
            <text:list text:style-name="L2">
              <text:list-item>
                <text:p text:style-name="P4">File encoding</text:p>
                <text:list>
                  <text:list-item>
                    <text:p>On Windows development machines, the default system encoding is often Windows-1252 or CP-1252</text:p>
                  </text:list-item>
                  <text:list-item>
                    <text:p>Java expects UTF-8 for source files, resource files, and configuration</text:p>
                  </text:list-item>
                  <text:list-item>
                    <text:p>Mismatched encoding causes silent data corruption in string literals</text:p>
                    <text:list>
                      <text:list-item>
                        <text:p>Particularly visible in JSON payloads, SQL statements with special characters, and internationalized error messages</text:p>
                      </text:list-item>
                      <text:list-item>
                        <text:p>Best case: compile error</text:p>
                      </text:list-item>
                      <text:list-item>
                        <text:p>Worst case: causes source files to be misread as garbled token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4" draw:text-style-name="P5" draw:layer="layout" svg:width="16.745cm" svg:height="12.194cm" svg:x="16cm" svg:y="4.5cm">
          <draw:image xlink:href="Pictures/1000000100000279000001CDA5C8448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File Encoding</text:p>
          </draw:text-box>
        </draw:frame>
        <draw:frame presentation:style-name="pr8" draw:layer="layout" svg:width="13.807cm" svg:height="12.543cm" svg:x="1.693cm" svg:y="4.457cm" presentation:class="outline">
          <draw:text-box>
            <text:list text:style-name="L2">
              <text:list-item>
                <text:p text:style-name="P4">How corruption typically happens</text:p>
                <text:list>
                  <text:list-item>
                    <text:p>Created or edited on Windows in Notepad</text:p>
                    <text:list>
                      <text:list-item>
                        <text:p>This app historically defaulted to UTF-16</text:p>
                      </text:list-item>
                    </text:list>
                  </text:list-item>
                  <text:list-item>
                    <text:p>Copied from a Windows SharePoint or Teams file share onto a Linux build server</text:p>
                  </text:list-item>
                  <text:list-item>
                    <text:p>Generated by a tool (Word, Excel export) that produces UTF-16 by default</text:p>
                  </text:list-item>
                  <text:list-item>
                    <text:p>Edited by a developer whose IDE was misconfigured</text:p>
                    <text:p/>
                  </text:list-item>
                </text:list>
              </text:list-item>
            </text:list>
          </draw:text-box>
        </draw:frame>
        <draw:frame draw:style-name="gr4" draw:text-style-name="P5" draw:layer="layout" svg:width="16.745cm" svg:height="12.194cm" svg:x="16cm" svg:y="4.5cm">
          <draw:image xlink:href="Pictures/1000000100000279000001CDA5C8448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IDE Memory</text:p>
          </draw:text-box>
        </draw:frame>
        <draw:frame presentation:style-name="pr8" draw:layer="layout" svg:width="13.807cm" svg:height="12.543cm" svg:x="1.693cm" svg:y="4.457cm" presentation:class="outline">
          <draw:text-box>
            <text:list text:style-name="L2">
              <text:list-item>
                <text:p text:style-name="P4">IDE memory settings</text:p>
                <text:list>
                  <text:list-item>
                    <text:p>Found under the <text:span text:style-name="T4">Help</text:span> menu</text:p>
                  </text:list-item>
                  <text:list-item>
                    <text:p>Spring Boot projects with multiple modules, Kafka, Oracle drivers, and test containers can require substantial heap</text:p>
                  </text:list-item>
                  <text:list-item>
                    <text:p>IntelliJ ships with conservative defaults (512MB–1GB) that cause noticeable slowdown on large projects</text:p>
                    <text:list>
                      <text:list-item>
                        <text:p>Refers to the memory used by the IDE, not the JVM used by the application</text:p>
                      </text:list-item>
                    </text:list>
                  </text:list-item>
                  <text:list-item>
                    <text:p>Increasing the heap eliminates the most common source of IDE lag on Spring builds</text:p>
                  </text:list-item>
                  <text:list-item>
                    <text:p>Set minimum to 2048 MB for any project with multiple Spring Boot modules</text:p>
                    <text:list>
                      <text:list-item>
                        <text:p>4096 MB is reasonable on a 16GB+ machine</text:p>
                      </text:list-item>
                    </text:list>
                  </text:list-item>
                </text:list>
              </text:list-item>
            </text:list>
            <text:p text:style-name="P4"/>
          </draw:text-box>
        </draw:frame>
        <draw:frame draw:style-name="gr4" draw:text-style-name="P5" draw:layer="layout" svg:width="13.014cm" svg:height="7.459cm" svg:x="18.5cm" svg:y="5.041cm">
          <draw:image xlink:href="Pictures/10000001000001EC0000011A81A8514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Run Configurations</text:p>
          </draw:text-box>
        </draw:frame>
        <draw:frame presentation:style-name="pr8" draw:layer="layout" svg:width="13.807cm" svg:height="12.543cm" svg:x="1.693cm" svg:y="4.457cm" presentation:class="outline">
          <draw:text-box>
            <text:list text:style-name="L2">
              <text:list-item>
                <text:p text:style-name="P4">A saved, named set of instructions that tells IntelliJ how to launch something</text:p>
                <text:list>
                  <text:list-item>
                    <text:p>Can be a Java application, a test class, a Maven goal, a Docker container, a remote debugger connection or a Spring Boot applications.</text:p>
                  </text:list-item>
                  <text:list-item>
                    <text:p>Determines exactly what happens when the run button is pressed</text:p>
                  </text:list-item>
                  <text:list-item>
                    <text:p>The first time the the green play button is selected a temporary <text:span text:style-name="T5">Run Configuration</text:span> is created but not saved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5.5cm" svg:height="13.091cm" svg:x="17.5cm" svg:y="4.909cm">
          <draw:image xlink:href="Pictures/100000010000031E000002A2236B33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Run Configurations</text:p>
          </draw:text-box>
        </draw:frame>
        <draw:frame presentation:style-name="pr8" draw:layer="layout" svg:width="13.807cm" svg:height="12.543cm" svg:x="1.693cm" svg:y="4.457cm" presentation:class="outline">
          <draw:text-box>
            <text:list text:style-name="L2">
              <text:list-item>
                <text:p text:style-name="P4">Three states for a <text:span text:style-name="T5">Run Configuration</text:span></text:p>
                <text:list>
                  <text:list-item>
                    <text:p>Temporary</text:p>
                    <text:list>
                      <text:list-item>
                        <text:p>Created automatically when you click Run next to a main() method.</text:p>
                      </text:list-item>
                      <text:list-item>
                        <text:p>IntelliJ keeps only the last few and then deletes old ones</text:p>
                      </text:list-item>
                    </text:list>
                  </text:list-item>
                  <text:list-item>
                    <text:p>Permanent</text:p>
                    <text:list>
                      <text:list-item>
                        <text:p>Saved locally in your IDE</text:p>
                      </text:list-item>
                      <text:list-item>
                        <text:p>Survives IDE restarts</text:p>
                      </text:list-item>
                      <text:list-item>
                        <text:p>Created by saving a temporary configuration or by creating one manually</text:p>
                      </text:list-item>
                    </text:list>
                  </text:list-item>
                  <text:list-item>
                    <text:p>Shared</text:p>
                    <text:list>
                      <text:list-item>
                        <text:p>Stored <text:s/>.idea/runConfigurations/ as an XML file and committed to Git</text:p>
                      </text:list-item>
                      <text:list-item>
                        <text:p>Every developer who clones the repo gets the same <text:span text:style-name="T5">Run Configurations</text:span> automaticall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6cm" svg:height="13.513cm" svg:x="17cm" svg:y="4.5cm">
          <draw:image xlink:href="Pictures/100000010000031E000002A2FCBFB53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Code Style and Editor Config</text:p>
          </draw:text-box>
        </draw:frame>
        <draw:frame presentation:style-name="pr8" draw:layer="layout" svg:width="13.807cm" svg:height="12.543cm" svg:x="1.693cm" svg:y="4.457cm" presentation:class="outline">
          <draw:text-box>
            <text:list text:style-name="L2">
              <text:list-item>
                <text:p text:style-name="P4">The merge conflict problem</text:p>
                <text:list>
                  <text:list-item>
                    <text:p>Two developers working on the same file</text:p>
                  </text:list-item>
                  <text:list-item>
                    <text:p>One is configured to use 4-space indents</text:p>
                  </text:list-item>
                  <text:list-item>
                    <text:p>The other is configured to use tabs</text:p>
                  </text:list-item>
                  <text:list-item>
                    <text:p>Neither changes the code logic </text:p>
                  </text:list-item>
                  <text:list-item>
                    <text:p>IntelliJ auto-formats on save so that <text:s/>every single line in the file appears as a change in Git</text:p>
                    <text:list>
                      <text:list-item>
                        <text:p>Git sees this as every line being deleted and rewritten</text:p>
                      </text:list-item>
                    </text:list>
                  </text:list-item>
                  <text:list-item>
                    <text:p>The goal of code style enforcement is to make every line in every diff meaningful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6cm" svg:height="0.569cm" svg:x="16.5cm" svg:y="18.301cm">
          <draw:text-box>
            <text:p text:style-name="P7"><text:span text:style-name="T6">Image Credit: https://xkcd.com/1513</text:span></text:p>
          </draw:text-box>
        </draw:frame>
        <draw:frame draw:style-name="gr5" draw:text-style-name="P6" draw:layer="layout" svg:width="13.75cm" svg:height="4.793cm" svg:x="17.75cm" svg:y="4.5cm">
          <draw:image xlink:href="Pictures/10000001000002E4000001027417667B.png" xlink:type="simple" xlink:show="embed" xlink:actuate="onLoad" draw:mime-type="image/png">
            <text:p/>
          </draw:image>
        </draw:frame>
        <draw:frame draw:style-name="gr5" draw:text-style-name="P6" draw:layer="layout" svg:width="14.419cm" svg:height="4.788cm" svg:x="17cm" svg:y="11cm">
          <draw:image xlink:href="Pictures/1000000100000221000000B53B2766B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Code Style and Editor Config</text:p>
          </draw:text-box>
        </draw:frame>
        <draw:frame presentation:style-name="pr8" draw:layer="layout" svg:width="13.807cm" svg:height="12.543cm" svg:x="1.693cm" svg:y="4.457cm" presentation:class="outline">
          <draw:text-box>
            <text:list text:style-name="L2">
              <text:list-item>
                <text:p text:style-name="P4">Code style covers two distinct categories of rules</text:p>
              </text:list-item>
              <text:list-item>
                <text:p>Formatting rules </text:p>
                <text:list>
                  <text:list-item>
                    <text:p>Purely cosmetic and do not affect compilation or runtime behaviour</text:p>
                  </text:list-item>
                  <text:list-item>
                    <text:p>They only affect how the source text looks on screen and on disk</text:p>
                    <text:list>
                      <text:list-item>
                        <text:p>Indentation (tabs vs spaces, how many spaces)</text:p>
                      </text:list-item>
                      <text:list-item>
                        <text:p>Line endings (LF vs CRLF)</text:p>
                      </text:list-item>
                      <text:list-item>
                        <text:p>Where braces go (same line or next line)</text:p>
                      </text:list-item>
                      <text:list-item>
                        <text:p>Maximum line length</text:p>
                      </text:list-item>
                    </text:list>
                  </text:list-item>
                  <text:list-item>
                    <text:p>Controlled by <text:span text:style-name="T5">.editorconfig</text:span> and IntelliJ's code style settings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6cm" svg:height="0.569cm" svg:x="16.5cm" svg:y="18.301cm">
          <draw:text-box>
            <text:p text:style-name="P7"><text:span text:style-name="T6">Image Credit: https://github.com/ichimax/Java-Style-Guide</text:span></text:p>
          </draw:text-box>
        </draw:frame>
        <draw:frame draw:style-name="gr5" draw:text-style-name="P6" draw:layer="layout" svg:width="7.942cm" svg:height="12.102cm" svg:x="20.5cm" svg:y="4.5cm">
          <draw:image xlink:href="Pictures/10000001000006050000092C193E0F1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Code Style and Editor Config</text:p>
          </draw:text-box>
        </draw:frame>
        <draw:frame presentation:style-name="pr8" draw:layer="layout" svg:width="13.807cm" svg:height="12.543cm" svg:x="1.693cm" svg:y="4.457cm" presentation:class="outline">
          <draw:text-box>
            <text:list text:style-name="L2">
              <text:list-item>
                <text:p text:style-name="P4">Code quality rules</text:p>
                <text:list>
                  <text:list-item>
                    <text:p>These affect the structure and correctness of the code itself</text:p>
                    <text:list>
                      <text:list-item>
                        <text:p>Naming conventions (camelCase for methods, PascalCase for classes)</text:p>
                      </text:list-item>
                      <text:list-item>
                        <text:p>Whether to use `var` or explicit types</text:p>
                      </text:list-item>
                      <text:list-item>
                        <text:p>Whether fields should be `final`</text:p>
                      </text:list-item>
                      <text:list-item>
                        <text:p>Import organization (no wildcards, grouped by package)</text:p>
                      </text:list-item>
                      <text:list-item>
                        <text:p>Complexity limits like max method length</text:p>
                      </text:list-item>
                    </text:list>
                  </text:list-item>
                  <text:list-item>
                    <text:p>Controlled by IntelliJ inspections, Checkstyle, or SonarQube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6cm" svg:height="0.569cm" svg:x="16.5cm" svg:y="18.301cm">
          <draw:text-box>
            <text:p text:style-name="P7"><text:span text:style-name="T6">Image Credit: https://github.com/ichimax/Java-Style-Guide</text:span></text:p>
          </draw:text-box>
        </draw:frame>
        <draw:frame draw:style-name="gr5" draw:text-style-name="P6" draw:layer="layout" svg:width="7.942cm" svg:height="12.102cm" svg:x="20.5cm" svg:y="4.5cm">
          <draw:image xlink:href="Pictures/10000001000006050000092C193E0F1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Code Style and Editor Config</text:p>
          </draw:text-box>
        </draw:frame>
        <draw:frame presentation:style-name="pr8" draw:layer="layout" svg:width="13.807cm" svg:height="12.543cm" svg:x="1.693cm" svg:y="4.457cm" presentation:class="outline">
          <draw:text-box>
            <text:list text:style-name="L2">
              <text:list-item>
                <text:p text:style-name="P4">Understanding the tool stack</text:p>
                <text:list>
                  <text:list-item>
                    <text:p>These affect the structure and correctness of the code itself</text:p>
                    <text:list>
                      <text:list-item>
                        <text:p>Naming conventions (camelCase for methods, PascalCase for classes)</text:p>
                      </text:list-item>
                      <text:list-item>
                        <text:p>Whether to use `var` or explicit types</text:p>
                      </text:list-item>
                      <text:list-item>
                        <text:p>Whether fields should be `final`</text:p>
                      </text:list-item>
                      <text:list-item>
                        <text:p>Import organization (no wildcards, grouped by package)</text:p>
                      </text:list-item>
                      <text:list-item>
                        <text:p>Complexity limits like max method length</text:p>
                      </text:list-item>
                    </text:list>
                  </text:list-item>
                  <text:list-item>
                    <text:p>Controlled by IntelliJ inspections, Checkstyle, or SonarQub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327cm" svg:height="8.041cm" svg:x="18.173cm" svg:y="5.959cm">
          <draw:image xlink:href="Pictures/10000001000001D200000130CDC406D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Editor Config</text:p>
          </draw:text-box>
        </draw:frame>
        <draw:frame presentation:style-name="pr8" draw:layer="layout" svg:width="13.807cm" svg:height="5.543cm" svg:x="1.693cm" svg:y="4.457cm" presentation:class="outline" presentation:user-transformed="true">
          <draw:text-box>
            <text:list text:style-name="L2">
              <text:list-item>
                <text:p text:style-name="P4">EditorConfig is the baseline</text:p>
                <text:list>
                  <text:list-item>
                    <text:p>Plain text file ini format that every modern editor understands</text:p>
                  </text:list-item>
                  <text:list-item>
                    <text:p>It enforces the most fundamental formatting rules in a way that works regardless of which IDE each developer uses</text:p>
                    <text:p/>
                  </text:list-item>
                </text:list>
              </text:list-item>
            </text:list>
          </draw:text-box>
        </draw:frame>
        <draw:frame draw:style-name="gr5" draw:text-style-name="P6" draw:layer="layout" svg:width="9.59cm" svg:height="6.305cm" svg:x="3.91cm" svg:y="10.5cm">
          <draw:image xlink:href="Pictures/100000010000026B00000197B92AF89A.png" xlink:type="simple" xlink:show="embed" xlink:actuate="onLoad" draw:mime-type="image/png">
            <text:p/>
          </draw:image>
        </draw:frame>
        <draw:frame draw:style-name="gr5" draw:text-style-name="P6" draw:layer="layout" svg:width="11.197cm" svg:height="10.5cm" svg:x="18.803cm" svg:y="5cm">
          <draw:image xlink:href="Pictures/10000001000001D2000001B53DA1E96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EditorConfig</text:p>
          </draw:text-box>
        </draw:frame>
        <draw:frame presentation:style-name="pr8" draw:layer="layout" svg:width="13.807cm" svg:height="12.543cm" svg:x="1.693cm" svg:y="4.457cm" presentation:class="outline" presentation:user-transformed="true">
          <draw:text-box>
            <text:list text:style-name="L2">
              <text:list-item>
                <text:p text:style-name="P4">When you open a file, the editor:</text:p>
                <text:list>
                  <text:list-item>
                    <text:p>Looks for a <text:span text:style-name="T5">.editorconfig</text:span> file in the same directory as the file</text:p>
                  </text:list-item>
                  <text:list-item>
                    <text:p>If not found, walks up the directory tree looking for one</text:p>
                  </text:list-item>
                  <text:list-item>
                    <text:p>Stops walking when it finds root = true</text:p>
                  </text:list-item>
                  <text:list-item>
                    <text:p>Applies the matching rules to the open file</text:p>
                  </text:list-item>
                </text:list>
              </text:list-item>
              <text:list-item>
                <text:p text:style-name="P4">This hierarchical lookup means </text:p>
                <text:list>
                  <text:list-item>
                    <text:p>Use a root <text:span text:style-name="T5">.editorconfig</text:span> for general rules</text:p>
                  </text:list-item>
                  <text:list-item>
                    <text:p>Override specific rules in sub-directories 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1.197cm" svg:height="10.5cm" svg:x="19cm" svg:y="5cm">
          <draw:image xlink:href="Pictures/10000001000001D2000001B53DA1E96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Code Style Engine</text:p>
          </draw:text-box>
        </draw:frame>
        <draw:frame presentation:style-name="pr8" draw:layer="layout" svg:width="13.807cm" svg:height="12.543cm" svg:x="1.693cm" svg:y="4.457cm" presentation:class="outline" presentation:user-transformed="true">
          <draw:text-box>
            <text:list text:style-name="L2">
              <text:list-item>
                <text:p text:style-name="P4">Applies IntelliJ-specific settings that EditorConfig cannot express</text:p>
                <text:list>
                  <text:list-item>
                    <text:p>Includes format items like</text:p>
                    <text:list>
                      <text:list-item>
                        <text:p>Brace placement</text:p>
                      </text:list-item>
                      <text:list-item>
                        <text:p>Import organization</text:p>
                      </text:list-item>
                      <text:list-item>
                        <text:p>Method chaining alignment</text:p>
                      </text:list-item>
                    </text:list>
                  </text:list-item>
                </text:list>
              </text:list-item>
              <text:list-item>
                <text:p>Stored in IntelliJ's code style XML</text:p>
                <text:list>
                  <text:list-item>
                    <text:p>Can be exported and committed to the repository</text:p>
                  </text:list-item>
                  <text:list-item>
                    <text:p>Ensures every team member's IntelliJ uses identical setting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6.423cm" svg:height="6.82cm" svg:x="16.5cm" svg:y="6.5cm">
          <draw:image xlink:href="Pictures/10000001000003D4000001979678A49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Code Style Engine</text:p>
          </draw:text-box>
        </draw:frame>
        <draw:frame presentation:style-name="pr8" draw:layer="layout" svg:width="13.807cm" svg:height="12.543cm" svg:x="1.693cm" svg:y="4.457cm" presentation:class="outline" presentation:user-transformed="true">
          <draw:text-box>
            <text:list text:style-name="L2">
              <text:list-item>
                <text:p text:style-name="P4">Relationship between the two tools</text:p>
              </text:list-item>
              <text:list-item>
                <text:p text:style-name="P4">EditorConfig</text:p>
                <text:list>
                  <text:list-item>
                    <text:p>Baseline rules for ALL editors</text:p>
                    <text:list>
                      <text:list-item>
                        <text:p>VS Code, Vim, Emacs, IntelliJ</text:p>
                      </text:list-item>
                    </text:list>
                  </text:list-item>
                </text:list>
              </text:list-item>
              <text:list-item>
                <text:p text:style-name="P4">IntelliJ Code Style</text:p>
                <text:list>
                  <text:list-item>
                    <text:p>Richer rules for IntelliJ specifically</text:p>
                  </text:list-item>
                  <text:list-item>
                    <text:p>Respects EditorConfig as the foundation <text:s/></text:p>
                  </text:list-item>
                  <text:list-item>
                    <text:p>Adds Language-specific formatting on top</text:p>
                  </text:list-item>
                  <text:list-item>
                    <text:p>When both can apply and and a rule exists in both EditorConfig takes precedence for the properties it cover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327cm" svg:height="8.041cm" svg:x="18.174cm" svg:y="5.96cm">
          <draw:image xlink:href="Pictures/10000001000001D200000130CDC406D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Checkstyle</text:p>
          </draw:text-box>
        </draw:frame>
        <draw:frame presentation:style-name="pr8" draw:layer="layout" svg:width="13.807cm" svg:height="12.543cm" svg:x="1.693cm" svg:y="4.457cm" presentation:class="outline" presentation:user-transformed="true">
          <draw:text-box>
            <text:list text:style-name="L2">
              <text:list-item>
                <text:p text:style-name="P4">Checkstyle is a static analysis tool</text:p>
                <text:list>
                  <text:list-item>
                    <text:p>Automatically checks Java source code against a defined set of coding rules</text:p>
                  </text:list-item>
                  <text:list-item>
                    <text:p>Reads a .java source files as text and AST (Abstract Syntax Tree) and verifies that they conform to a defined ruleset </text:p>
                  </text:list-item>
                  <text:list-item>
                    <text:p>It does not compile the code, does not run it, and does not analyze runtime behavior</text:p>
                  </text:list-item>
                  <text:list-item>
                    <text:p>It purely analyses the structure and style of the source text</text:p>
                  </text:list-item>
                  <text:list-item>
                    <text:p>Checkstyle is the enforcement layer</text:p>
                    <text:list>
                      <text:list-item>
                        <text:p>Code does not build until the violation is fixed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6.004cm" svg:height="2.512cm" svg:x="16.5cm" svg:y="7cm">
          <draw:image xlink:href="Pictures/100000010000025D0000005F39F89C1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Checkstyle</text:p>
          </draw:text-box>
        </draw:frame>
        <draw:frame presentation:style-name="pr8" draw:layer="layout" svg:width="13.807cm" svg:height="12.543cm" svg:x="1.693cm" svg:y="4.457cm" presentation:class="outline" presentation:user-transformed="true">
          <draw:text-box>
            <text:list text:style-name="L2">
              <text:list-item>
                <text:p text:style-name="P4">Ships with standard pre-built configurations</text:p>
                <text:list>
                  <text:list-item>
                    <text:p>These are used as a starting point for developing a customized style guide</text:p>
                  </text:list-item>
                </text:list>
              </text:list-item>
              <text:list-item>
                <text:p>Google Java style guide</text:p>
                <text:list>
                  <text:list-item>
                    <text:p>Used by Google internally and published as an open standard</text:p>
                  </text:list-item>
                  <text:list-item>
                    <text:p>Most widely adopted in modern Java teams</text:p>
                  </text:list-item>
                </text:list>
              </text:list-item>
              <text:list-item>
                <text:p>Sun coding conventions</text:p>
                <text:list>
                  <text:list-item>
                    <text:p>Original Java coding standard from Sun</text:p>
                  </text:list-item>
                  <text:list-item>
                    <text:p>Included mainly for backward and historical compatibility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3.033cm" svg:height="8cm" svg:x="18.467cm" svg:y="6cm">
          <draw:image xlink:href="Pictures/1000000100000168000000DD1DB1F28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Checkstyle</text:p>
          </draw:text-box>
        </draw:frame>
        <draw:frame presentation:style-name="pr8" draw:layer="layout" svg:width="13.807cm" svg:height="12.543cm" svg:x="1.693cm" svg:y="4.457cm" presentation:class="outline" presentation:user-transformed="true">
          <draw:text-box>
            <text:list text:style-name="L2">
              <text:list-item>
                <text:p text:style-name="P4">Integrating Checkstyle into Maven</text:p>
                <text:list>
                  <text:list-item>
                    <text:p>Checkstyle is added to the pom file as a plugin as shown</text:p>
                  </text:list-item>
                  <text:list-item>
                    <text:p>Can be run automatically as part of the build process</text:p>
                  </text:list-item>
                  <text:list-item>
                    <text:p>Or run manually 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093cm" svg:height="12.408cm" svg:x="18.907cm" svg:y="4.5cm">
          <draw:image xlink:href="Pictures/1000000100000241000002509C8BCF8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Checkstyle</text:p>
          </draw:text-box>
        </draw:frame>
        <draw:frame presentation:style-name="pr8" draw:layer="layout" svg:width="13.807cm" svg:height="12.543cm" svg:x="1.693cm" svg:y="4.457cm" presentation:class="outline" presentation:user-transformed="true">
          <draw:text-box>
            <text:list text:style-name="L2">
              <text:list-item>
                <text:p text:style-name="P4">Checkstyle configuration file</text:p>
                <text:list>
                  <text:list-item>
                    <text:p>The configuration file defines exactly which rules are active and how they are configured</text:p>
                  </text:list-item>
                  <text:list-item>
                    <text:p>The example of the left is a snippet of part of a Checkstyle configuration fil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073cm" svg:height="14.449cm" svg:x="17.927cm" svg:y="3.105cm">
          <draw:image xlink:href="Pictures/10000001000002140000024C41B39C5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Checkstyle</text:p>
          </draw:text-box>
        </draw:frame>
        <draw:frame presentation:style-name="pr8" draw:layer="layout" svg:width="13.807cm" svg:height="5.543cm" svg:x="1.693cm" svg:y="4.457cm" presentation:class="outline" presentation:user-transformed="true">
          <draw:text-box>
            <text:list text:style-name="L2">
              <text:list-item>
                <text:p text:style-name="P4">Checkstyle configuration file</text:p>
                <text:list>
                  <text:list-item>
                    <text:p>The location of the file is specified in the pom file as shown</text:p>
                  </text:list-item>
                  <text:list-item>
                    <text:p>However, putting it in <text:span text:style-name="T5">config/checkstyle/</text:span> location is the de facto standard for enterprise Java projects.</text:p>
                    <text:p/>
                  </text:list-item>
                </text:list>
              </text:list-item>
            </text:list>
          </draw:text-box>
        </draw:frame>
        <draw:frame draw:style-name="gr5" draw:text-style-name="P6" draw:layer="layout" svg:width="6.374cm" svg:height="4.231cm" svg:x="17cm" svg:y="10cm">
          <draw:image xlink:href="Pictures/10000001000000F1000000A0F5D424A0.png" xlink:type="simple" xlink:show="embed" xlink:actuate="onLoad" draw:mime-type="image/png">
            <text:p/>
          </draw:image>
        </draw:frame>
        <draw:frame draw:style-name="gr5" draw:text-style-name="P6" draw:layer="layout" svg:width="16.692cm" svg:height="2.512cm" svg:x="16.308cm" svg:y="5.488cm">
          <draw:image xlink:href="Pictures/10000001000002770000005F4FB1828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Checkstyle</text:p>
          </draw:text-box>
        </draw:frame>
        <draw:frame presentation:style-name="pr8" draw:layer="layout" svg:width="13.807cm" svg:height="12.543cm" svg:x="1.693cm" svg:y="4.457cm" presentation:class="outline" presentation:user-transformed="true">
          <draw:text-box>
            <text:list text:style-name="L2">
              <text:list-item>
                <text:p text:style-name="P4">Checkstyle configuration file</text:p>
                <text:list>
                  <text:list-item>
                    <text:p>The configuration file defines exactly which rules are active and how they are configured</text:p>
                  </text:list-item>
                  <text:list-item>
                    <text:p>The example of the left is a snippet of part of a Checkstyle configuration file</text:p>
                  </text:list-item>
                </text:list>
                <text:p/>
              </text:list-item>
            </text:list>
          </draw:text-box>
        </draw:frame>
        <draw:frame draw:style-name="gr5" draw:text-style-name="P6" draw:layer="layout" svg:width="13.073cm" svg:height="14.449cm" svg:x="17.927cm" svg:y="3.105cm">
          <draw:image xlink:href="Pictures/10000001000002140000024C41B39C5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Checkstyle</text:p>
          </draw:text-box>
        </draw:frame>
        <draw:frame presentation:style-name="pr8" draw:layer="layout" svg:width="13.807cm" svg:height="12.543cm" svg:x="1.693cm" svg:y="4.457cm" presentation:class="outline" presentation:user-transformed="true">
          <draw:text-box>
            <text:list text:style-name="L2">
              <text:list-item>
                <text:p text:style-name="P4">Cyclomatic complexity</text:p>
                <text:list>
                  <text:list-item>
                    <text:p>One of the most useful rules</text:p>
                  </text:list-item>
                  <text:list-item>
                    <text:p>Directly correlates with code quality, testability, and maintainability</text:p>
                  </text:list-item>
                  <text:list-item>
                    <text:p>Counts the number of independent paths through a method</text:p>
                    <text:list>
                      <text:list-item>
                        <text:p>Every decision point adds 1 to the complexity</text:p>
                      </text:list-item>
                    </text:list>
                  </text:list-item>
                  <text:list-item>
                    <text:p>A method with complexity 15 requires at minimum 15 test cases to achieve full branch coverage</text:p>
                    <text:list>
                      <text:list-item>
                        <text:p><text:s/>In practice it rarely gets fully tested, which means it harbours untested paths that become production bugs</text:p>
                      </text:list-item>
                    </text:list>
                  </text:list-item>
                  <text:list-item>
                    <text:p>Using `max=10` on forces developers to decompose complex methods into smaller, single-responsibility methods</text:p>
                    <text:p/>
                  </text:list-item>
                </text:list>
              </text:list-item>
            </text:list>
          </draw:text-box>
        </draw:frame>
        <draw:frame draw:style-name="gr5" draw:text-style-name="P6" draw:layer="layout" svg:width="12.157cm" svg:height="9.187cm" svg:x="18.343cm" svg:y="3.557cm">
          <draw:image xlink:href="Pictures/100000010000023D000001B1C10CC3AF.png" xlink:type="simple" xlink:show="embed" xlink:actuate="onLoad" draw:mime-type="image/png">
            <text:p/>
          </draw:image>
        </draw:frame>
        <draw:frame draw:style-name="gr5" draw:text-style-name="P6" draw:layer="layout" svg:width="15.977cm" svg:height="3.464cm" svg:x="16.523cm" svg:y="13.5cm">
          <draw:image xlink:href="Pictures/100000010000025C00000083BD4FA07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Checkstyle</text:p>
          </draw:text-box>
        </draw:frame>
        <draw:frame presentation:style-name="pr8" draw:layer="layout" svg:width="13.807cm" svg:height="12.543cm" svg:x="1.693cm" svg:y="4.457cm" presentation:class="outline" presentation:user-transformed="true">
          <draw:text-box>
            <text:list text:style-name="L2">
              <text:list-item>
                <text:p text:style-name="P4">The suppressions file <text:s/>tells Checkstyle to ignore specific rule violations in specific places</text:p>
                <text:list>
                  <text:list-item>
                    <text:p>Prevents the ruleset from becoming so rigid that it blocks legitimate work</text:p>
                  </text:list-item>
                  <text:list-item>
                    <text:p>Without a suppressions file, every rule in your checkstyle.xml applies to every Java file in your project with no exceptions</text:p>
                  </text:list-item>
                  <text:list-item>
                    <text:p>There exists situations where a rule violation is either unavoidable, irrelevant, or would require more harm than good to fix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4.549cm" svg:height="8.729cm" svg:x="16.951cm" svg:y="5.771cm">
          <draw:image xlink:href="Pictures/10000001000002260000014AB3DBE57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Checkstyle</text:p>
          </draw:text-box>
        </draw:frame>
        <draw:frame presentation:style-name="pr8" draw:layer="layout" svg:width="13.807cm" svg:height="12.543cm" svg:x="1.693cm" svg:y="4.457cm" presentation:class="outline" presentation:user-transformed="true">
          <draw:text-box>
            <text:list text:style-name="L2">
              <text:list-item>
                <text:p text:style-name="P4">Where Checkstyle should not apply</text:p>
                <text:list>
                  <text:list-item>
                    <text:p>Generated code</text:p>
                    <text:list>
                      <text:list-item>
                        <text:p>JPA metamodel classes, Protocol Buffer generated classes, JOOQ database classes, and similar auto-generated sources</text:p>
                      </text:list-item>
                      <text:list-item>
                        <text:p>Ffrequently violate naming conventions, line length limits, and complexity rules. </text:p>
                      </text:list-item>
                      <text:list-item>
                        <text:p>Not written by developers and should not be reviewed as if they were.</text:p>
                      </text:list-item>
                    </text:list>
                  </text:list-item>
                  <text:list-item>
                    <text:p>Legacy code being migrated</text:p>
                    <text:list>
                      <text:list-item>
                        <text:p>Applying to an existing codebase, would produce thousands of violations that have nothing to do with the work in progress</text:p>
                      </text:list-item>
                      <text:list-item>
                        <text:p>A pragmatic migration strategy suppresses violations on legacy files while enforcing rules strictly on new code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5" draw:text-style-name="P6" draw:layer="layout" svg:width="14.549cm" svg:height="8.729cm" svg:x="16.951cm" svg:y="5.771cm">
          <draw:image xlink:href="Pictures/10000001000002260000014AB3DBE57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Checkstyle</text:p>
          </draw:text-box>
        </draw:frame>
        <draw:frame presentation:style-name="pr8" draw:layer="layout" svg:width="13.807cm" svg:height="12.543cm" svg:x="1.693cm" svg:y="4.457cm" presentation:class="outline" presentation:user-transformed="true">
          <draw:text-box>
            <text:list text:style-name="L2">
              <text:list-item>
                <text:p text:style-name="P4">Where Checkstyle should not apply</text:p>
                <text:list>
                  <text:list-item>
                    <text:p>Test code</text:p>
                    <text:list>
                      <text:list-item>
                        <text:p>Legitimately use magic numbers as test data</text:p>
                      </text:list-item>
                      <text:list-item>
                        <text:p>Have long method bodies that set up complex scenarios</text:p>
                      </text:list-item>
                      <text:list-item>
                        <text:p>Use naming conventions <text:s/>that violate production naming rules. </text:p>
                      </text:list-item>
                    </text:list>
                  </text:list-item>
                  <text:list-item>
                    <text:p>Framework constraints</text:p>
                    <text:list>
                      <text:list-item>
                        <text:p>Some frameworks require specific patterns that violate style rules</text:p>
                      </text:list-item>
                      <text:list-item>
                        <text:p>For example, Spring's @Configuration classes sometimes have long methods</text:p>
                      </text:list-item>
                      <text:list-item>
                        <text:p>JPA entities sometimes require default constructors that Checkstyle's design rules would flag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4.549cm" svg:height="8.729cm" svg:x="16.951cm" svg:y="5.771cm">
          <draw:image xlink:href="Pictures/10000001000002260000014AB3DBE57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Checkstyle</text:p>
          </draw:text-box>
        </draw:frame>
        <draw:frame presentation:style-name="pr8" draw:layer="layout" svg:width="13.807cm" svg:height="12.543cm" svg:x="1.693cm" svg:y="4.457cm" presentation:class="outline" presentation:user-transformed="true">
          <draw:text-box>
            <text:list text:style-name="L2">
              <text:list-item>
                <text:p text:style-name="P4">Applying suppression rules</text:p>
                <text:list>
                  <text:list-item>
                    <text:p>Can specify which files, directories and rules should be suppressed</text:p>
                  </text:list-item>
                  <text:list-item>
                    <text:p>Regex can be used for both argument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4.549cm" svg:height="8.094cm" svg:x="17cm" svg:y="6cm">
          <draw:image xlink:href="Pictures/100000010000022600000132253A835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Two_20_left_20_Conent" presentation:presentation-page-layout-name="AL2T1">
        <office:forms form:automatic-focus="false" form:apply-design-mode="false"/>
        <draw:frame presentation:style-name="pr7" draw:layer="layout" svg:width="26.54cm" svg:height="1.57cm" svg:x="2.46cm" svg:y="1.02cm" presentation:class="title">
          <draw:text-box>
            <text:p>Checkstyle</text:p>
          </draw:text-box>
        </draw:frame>
        <draw:frame presentation:style-name="pr8" draw:layer="layout" svg:width="13.807cm" svg:height="12.543cm" svg:x="1.693cm" svg:y="4.457cm" presentation:class="outline" presentation:user-transformed="true">
          <draw:text-box>
            <text:list text:style-name="L2">
              <text:list-item>
                <text:p text:style-name="P4">Applying suppression rules</text:p>
                <text:list>
                  <text:list-item>
                    <text:p>Can specify which files, directories and rules should be suppressed</text:p>
                  </text:list-item>
                  <text:list-item>
                    <text:p>Regex can be used for both argument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4.549cm" svg:height="8.094cm" svg:x="17cm" svg:y="6cm">
          <draw:image xlink:href="Pictures/100000010000022600000132253A835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One_20_Up_20_Content" presentation:presentation-page-layout-name="AL1T0">
        <office:forms form:automatic-focus="false" form:apply-design-mode="false"/>
        <draw:frame draw:style-name="gr1" draw:text-style-name="P1" draw:layer="layout" svg:width="16cm" svg:height="1.5cm" svg:x="1.5cm" svg:y="2cm">
          <draw:text-box>
            <text:p><text:span text:style-name="T1">Questions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eelawadee" svg:font-family="Leelawadee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0000007800000043862755C2A.png" xlink:type="simple" xlink:show="embed" xlink:actuate="onLoad"/>
    <draw:fill-image draw:name="Bitmap_20_3" draw:display-name="Bitmap 3" xlink:href="Pictures/10000000000007800000043862755C2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Numbered_20_List_7e_LT_7e_Hintergrundobjekte" style:display-name="1_Numbered List~LT~Hintergrundobjekte" style:family="graphic">
      <style:paragraph-properties style:text-autospace="none"/>
      <style:text-properties style:letter-kerning="tru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10pt" style:font-size-asian="10pt" style:font-size-complex="10pt"/>
    </style:style>
    <style:style style:name="Header_20_and_20_Footer" style:display-name="Header and Footer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Noto Sans1" style:font-family-complex="'Noto Sans'" style:font-family-generic-complex="swiss"/>
    </style:style>
    <style:style style:name="List" style:family="graphic">
      <style:paragraph-properties style:text-autospace="none"/>
      <style:text-properties style:font-name-complex="Noto Sans1" style:font-family-complex="'Noto Sans'" style:font-family-generic-complex="swiss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_20_Paragraph" style:display-name="List Paragraph" style:family="graphic">
      <style:graphic-properties style:writing-mode="lr-tb"/>
      <style:paragraph-properties style:text-autospace="none"/>
      <style:text-properties style:use-window-font-color="true" loext:opacity="0%" style:font-name="Arial" fo:font-family="Arial" style:font-family-generic="roman" style:font-pitch="variable" fo:font-size="11pt" fo:language="en" fo:country="CA" style:font-name-asian="Arial2" style:font-family-asian="Arial" style:font-pitch-asian="variable" style:language-asian="zh" style:country-asian="CN" style:font-name-complex="Arial" style:font-family-complex="Arial" style:font-family-generic-complex="roman" style:font-pitch-complex="variable" style:font-size-complex="11pt" style:language-complex="en" style:country-complex="CA"/>
    </style:style>
    <style:style style:name="ListLabel_20_1" style:display-name="ListLabel 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13" style:display-name="ListLabel 13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14" style:display-name="ListLabel 14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15" style:display-name="ListLabel 15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16" style:display-name="ListLabel 16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17" style:display-name="ListLabel 17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18" style:display-name="ListLabel 18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19" style:display-name="ListLabel 19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2" style:display-name="ListLabel 2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21" style:display-name="ListLabel 21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22" style:display-name="ListLabel 22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23" style:display-name="ListLabel 23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24" style:display-name="ListLabel 24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25" style:display-name="ListLabel 25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26" style:display-name="ListLabel 26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27" style:display-name="ListLabel 27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28" style:display-name="ListLabel 28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29" style:display-name="ListLabel 29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3" style:display-name="ListLabel 3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31" style:display-name="ListLabel 31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32" style:display-name="ListLabel 32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33" style:display-name="ListLabel 33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34" style:display-name="ListLabel 34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35" style:display-name="ListLabel 35" style:family="graphic">
      <style:paragraph-properties style:text-autospace="none"/>
      <style:text-properties fo:color="#2e75b6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pitch-asian="variable" style:font-name-complex="Arial" style:font-family-complex="Arial" style:font-family-generic-complex="roman" style:font-pitch-complex="variable" style:font-size-complex="11pt"/>
    </style:style>
    <style:style style:name="ListLabel_20_4" style:display-name="ListLabel 4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style:font-name="Arial" fo:font-family="Arial" style:font-family-generic="roman" style:font-pitch="variable" fo:font-size="11pt" fo:language="en" fo:country="CA" style:font-name-asian="Arial2" style:font-family-asian="Arial" style:font-pitch-asian="variable" style:language-asian="zh" style:country-asian="CN" style:font-name-complex="Arial" style:font-family-complex="Arial" style:font-family-generic-complex="roman" style:font-pitch-complex="variable" style:font-size-complex="11pt" style:language-complex="en" style:country-complex="CA"/>
    </style:style>
    <style:style style:name="Strong_20_Emphasis" style:display-name="Strong Emphasis" style:family="graphic">
      <style:graphic-properties style:writing-mode="lr-tb"/>
      <style:paragraph-properties style:text-autospace="none"/>
      <style:text-properties style:use-window-font-color="true" loext:opacity="0%" style:font-name="Arial" fo:font-family="Arial" style:font-family-generic="roman" style:font-pitch="variable" fo:font-size="11pt" fo:language="en" fo:country="CA" fo:font-weight="bold" style:font-name-asian="Arial2" style:font-family-asian="Arial" style:font-pitch-asian="variable" style:language-asian="zh" style:country-asian="CN" style:font-name-complex="Arial" style:font-family-complex="Arial" style:font-family-generic-complex="roman" style:font-pitch-complex="variable" style:font-size-complex="11pt" style:language-complex="en" style:country-complex="CA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footer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text" style:display-name="footnote text" style:family="graphic">
      <style:paragraph-properties fo:margin-top="0cm" fo:margin-bottom="0cm" fo:line-height="100%" style:text-autospace="none"/>
      <style:text-properties fo:font-size="10pt" style:font-size-asian="10pt" style:font-size-complex="10pt"/>
    </style:style>
    <style:style style:name="header" style:family="graphic">
      <style:paragraph-properties style:text-autospace="none"/>
    </style:style>
    <style:style style:name="heading_20_1" style:display-name="heading 1" style:family="graphic">
      <style:paragraph-properties fo:margin-top="1.12cm" fo:margin-bottom="0.623cm" style:text-autospace="none"/>
      <style:text-properties fo:color="#ffffff" loext:opacity="100%" style:font-name="Arial1" fo:font-family="Arial" style:font-family-generic="swiss" style:font-pitch="variable" fo:font-size="18pt" fo:font-weight="bold" style:font-name-asian="Arial2" style:font-family-asian="Arial" style:font-pitch-asian="variable" style:font-name-complex="Arial1" style:font-family-complex="Arial" style:font-family-generic-complex="swiss" style:font-pitch-complex="variable" style:font-size-complex="18pt" style:font-weight-complex="bold"/>
    </style:style>
    <style:style style:name="heading_20_2" style:display-name="heading 2" style:family="graphic">
      <style:paragraph-properties fo:margin-top="0.871cm" fo:margin-bottom="0.436cm" style:text-autospace="none"/>
      <style:text-properties fo:color="#ffffff" loext:opacity="100%" style:font-name="Arial1" fo:font-family="Arial" style:font-family-generic="swiss" style:font-pitch="variable" fo:font-size="14pt" fo:font-weight="bold" style:font-name-asian="Arial2" style:font-family-asian="Arial" style:font-pitch-asian="variable" style:font-name-complex="Arial1" style:font-family-complex="Arial" style:font-family-generic-complex="swiss" style:font-pitch-complex="variable" style:font-size-complex="14pt" style:font-weight-complex="bold"/>
    </style:style>
    <style:style style:name="heading_20_3" style:display-name="heading 3" style:family="graphic">
      <style:paragraph-properties fo:margin-top="0.623cm" fo:margin-bottom="0.31cm" style:text-autospace="none"/>
      <style:text-properties style:use-window-font-color="true" loext:opacity="0%" style:font-name="Arial1" fo:font-family="Arial" style:font-family-generic="swiss" style:font-pitch="variable" fo:font-size="12pt" fo:font-weight="bold" style:font-name-asian="Arial2" style:font-family-asian="Arial" style:font-pitch-asian="variable" style:font-name-complex="Arial1" style:font-family-complex="Arial" style:font-family-generic-complex="swiss" style:font-pitch-complex="variable" style:font-size-complex="12pt" style:font-weight-complex="bold"/>
    </style:style>
    <style:style style:name="heading_20_4" style:display-name="heading 4" style:family="graphic">
      <style:paragraph-properties fo:margin-top="0.497cm" fo:margin-bottom="0.249cm" style:text-autospace="none"/>
      <style:text-properties fo:color="#2e75b6" loext:opacity="100%" style:font-name="Arial1" fo:font-family="Arial" style:font-family-generic="swiss" style:font-pitch="variable" fo:font-size="11pt" fo:font-weight="bold" style:font-name-asian="Arial2" style:font-family-asian="Arial" style:font-pitch-asian="variable" style:font-name-complex="Arial1" style:font-family-complex="Arial" style:font-family-generic-complex="swiss" style:font-pitch-complex="variable" style:font-size-complex="11pt" style:font-weight-complex="bold"/>
    </style:style>
    <style:style style:name="heading_20_5" style:display-name="heading 5" style:family="graphic">
      <style:paragraph-properties style:text-autospace="none"/>
      <style:text-properties style:use-window-font-color="true" loext:opacity="0%"/>
    </style:style>
    <style:style style:name="heading_20_6" style:display-name="heading 6" style:family="graphic">
      <style:paragraph-properties style:text-autospace="none"/>
      <style:text-properties style:use-window-font-color="true" loext:opacity="0%"/>
    </style:style>
    <style:style style:name="One_20_Up_20_Content-background" style:display-name="One Up Content-background" style:family="presentation">
      <style:graphic-properties draw:stroke="none" draw:fill="none"/>
      <style:text-properties style:letter-kerning="true"/>
    </style:style>
    <style:style style:name="One_20_Up_20_Content-backgroundobjects" style:display-name="One Up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Up_20_Content-notes" style:display-name="One Up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Up_20_Content-outline1" style:display-name="One Up Content-outline1" style:family="presentation">
      <style:graphic-properties draw:stroke="none" draw:fill="none" draw:auto-grow-height="false" draw:fit-to-size="false" style:shrink-to-fit="true">
        <text:list-style style:name="One_20_Up_20_Content-outline1" style:display-name="One Up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2" style:font-family-complex="'Noto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ne_20_Up_20_Content-outline2" style:display-name="One Up Content-outline2" style:family="presentation" style:parent-style-name="One_20_Up_20_Content-outline1">
      <style:paragraph-properties fo:margin-left="0cm" fo:margin-right="0cm" fo:margin-top="0.483cm" fo:margin-bottom="0cm" fo:text-indent="0cm"/>
      <style:text-properties fo:font-size="18pt" style:font-size-asian="18pt" style:font-size-complex="18pt"/>
    </style:style>
    <style:style style:name="One_20_Up_20_Content-outline3" style:display-name="One Up Content-outline3" style:family="presentation" style:parent-style-name="One_20_Up_20_Content-outline2">
      <style:paragraph-properties fo:margin-left="0cm" fo:margin-right="0cm" fo:margin-top="0.362cm" fo:margin-bottom="0cm" fo:text-indent="0cm"/>
      <style:text-properties fo:font-size="14pt" style:font-size-asian="14pt" style:font-size-complex="14pt"/>
    </style:style>
    <style:style style:name="One_20_Up_20_Content-outline4" style:display-name="One Up Content-outline4" style:family="presentation" style:parent-style-name="One_20_Up_20_Content-outline3">
      <style:paragraph-properties fo:margin-left="0cm" fo:margin-right="0cm" fo:margin-top="0.241cm" fo:margin-bottom="0cm" fo:text-indent="0cm"/>
      <style:text-properties fo:font-size="12pt" fo:font-style="italic" style:font-size-asian="12pt" style:font-style-asian="italic" style:font-size-complex="12pt" style:font-style-complex="italic"/>
    </style:style>
    <style:style style:name="One_20_Up_20_Content-outline5" style:display-name="One Up Content-outline5" style:family="presentation" style:parent-style-name="One_20_Up_20_Content-outline4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One_20_Up_20_Content-outline6" style:display-name="One Up Content-outline6" style:family="presentation" style:parent-style-name="One_20_Up_20_Content-outline5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One_20_Up_20_Content-outline7" style:display-name="One Up Content-outline7" style:family="presentation" style:parent-style-name="One_20_Up_20_Content-outline6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One_20_Up_20_Content-outline8" style:display-name="One Up Content-outline8" style:family="presentation" style:parent-style-name="One_20_Up_20_Content-outline7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One_20_Up_20_Content-outline9" style:display-name="One Up Content-outline9" style:family="presentation" style:parent-style-name="One_20_Up_20_Content-outline8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One_20_Up_20_Content-subtitle" style:display-name="One Up Content-subtitle" style:family="presentation">
      <style:graphic-properties draw:stroke="none" draw:fill="none" draw:textarea-vertical-align="middle">
        <text:list-style style:name="One_20_Up_20_Content-subtitle" style:display-name="One Up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Up_20_Content-title" style:display-name="One Up Content-title" style:family="presentation">
      <style:graphic-properties draw:stroke="none" draw:fill="none" draw:textarea-vertical-align="middle">
        <text:list-style style:name="One_20_Up_20_Content-title" style:display-name="One Up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0504d" loext:opacity="100%" style:text-outline="false" style:text-line-through-style="none" style:text-line-through-type="none" style:font-name="Leelawadee" fo:font-family="Leelawadee" style:font-pitch="variable" fo:font-size="3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normal" style:font-name-complex="Noto Sans2" style:font-family-complex="'Noto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wo_20_left_20_Conent-background" style:display-name="Two left Conent-background" style:family="presentation">
      <style:graphic-properties draw:stroke="none" draw:fill="none"/>
      <style:text-properties style:letter-kerning="true"/>
    </style:style>
    <style:style style:name="Two_20_left_20_Conent-backgroundobjects" style:display-name="Two left Con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left_20_Conent-notes" style:display-name="Two left Con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left_20_Conent-outline1" style:display-name="Two left Conent-outline1" style:family="presentation">
      <style:graphic-properties draw:stroke="none" draw:fill="none" draw:auto-grow-height="false" draw:fit-to-size="false" style:shrink-to-fit="true">
        <text:list-style style:name="Two_20_left_20_Conent-outline1" style:display-name="Two left Con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2" style:font-family-complex="'Noto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wo_20_left_20_Conent-outline2" style:display-name="Two left Conent-outline2" style:family="presentation" style:parent-style-name="Two_20_left_20_Conent-outline1">
      <style:paragraph-properties fo:margin-left="0cm" fo:margin-right="0cm" fo:margin-top="0.483cm" fo:margin-bottom="0cm" fo:text-indent="0cm"/>
      <style:text-properties fo:font-size="18pt" style:font-size-asian="18pt" style:font-size-complex="18pt"/>
    </style:style>
    <style:style style:name="Two_20_left_20_Conent-outline3" style:display-name="Two left Conent-outline3" style:family="presentation" style:parent-style-name="Two_20_left_20_Conent-outline2">
      <style:paragraph-properties fo:margin-left="0cm" fo:margin-right="0cm" fo:margin-top="0.362cm" fo:margin-bottom="0cm" fo:text-indent="0cm"/>
      <style:text-properties fo:font-size="14pt" style:font-size-asian="14pt" style:font-size-complex="14pt"/>
    </style:style>
    <style:style style:name="Two_20_left_20_Conent-outline4" style:display-name="Two left Conent-outline4" style:family="presentation" style:parent-style-name="Two_20_left_20_Conent-outline3">
      <style:paragraph-properties fo:margin-left="0cm" fo:margin-right="0cm" fo:margin-top="0.241cm" fo:margin-bottom="0cm" fo:text-indent="0cm"/>
      <style:text-properties fo:font-size="12pt" fo:font-style="italic" style:font-size-asian="12pt" style:font-style-asian="italic" style:font-size-complex="12pt" style:font-style-complex="italic"/>
    </style:style>
    <style:style style:name="Two_20_left_20_Conent-outline5" style:display-name="Two left Conent-outline5" style:family="presentation" style:parent-style-name="Two_20_left_20_Conent-outline4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Two_20_left_20_Conent-outline6" style:display-name="Two left Conent-outline6" style:family="presentation" style:parent-style-name="Two_20_left_20_Conent-outline5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Two_20_left_20_Conent-outline7" style:display-name="Two left Conent-outline7" style:family="presentation" style:parent-style-name="Two_20_left_20_Conent-outline6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Two_20_left_20_Conent-outline8" style:display-name="Two left Conent-outline8" style:family="presentation" style:parent-style-name="Two_20_left_20_Conent-outline7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Two_20_left_20_Conent-outline9" style:display-name="Two left Conent-outline9" style:family="presentation" style:parent-style-name="Two_20_left_20_Conent-outline8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Two_20_left_20_Conent-subtitle" style:display-name="Two left Conent-subtitle" style:family="presentation">
      <style:graphic-properties draw:stroke="none" draw:fill="none" draw:textarea-vertical-align="middle">
        <text:list-style style:name="Two_20_left_20_Conent-subtitle" style:display-name="Two left Con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left_20_Conent-title" style:display-name="Two left Conent-title" style:family="presentation">
      <style:graphic-properties draw:stroke="none" draw:fill="none" draw:textarea-vertical-align="middle">
        <text:list-style style:name="Two_20_left_20_Conent-title" style:display-name="Two left Con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0504d" loext:opacity="100%" style:text-outline="false" style:text-line-through-style="none" style:text-line-through-type="none" style:font-name="Leelawadee" fo:font-family="Leelawadee" style:font-pitch="variable" fo:font-size="3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normal" style:font-name-complex="Noto Sans2" style:font-family-complex="'Noto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wo-thirds-background" style:family="presentation">
      <style:graphic-properties draw:stroke="none" draw:fill="none"/>
      <style:text-properties style:letter-kerning="true"/>
    </style:style>
    <style:style style:name="Two-third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-third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-thirds-outline1" style:family="presentation">
      <style:graphic-properties draw:stroke="none" draw:fill="none" draw:auto-grow-height="false" draw:fit-to-size="false" style:shrink-to-fit="true">
        <text:list-style style:name="Two-third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2" style:font-family-complex="'Noto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wo-thirds-outline2" style:family="presentation" style:parent-style-name="Two-thirds-outline1">
      <style:paragraph-properties fo:margin-left="0cm" fo:margin-right="0cm" fo:margin-top="0.483cm" fo:margin-bottom="0cm" fo:text-indent="0cm"/>
      <style:text-properties fo:font-size="18pt" style:font-size-asian="18pt" style:font-size-complex="18pt"/>
    </style:style>
    <style:style style:name="Two-thirds-outline3" style:family="presentation" style:parent-style-name="Two-thirds-outline2">
      <style:paragraph-properties fo:margin-left="0cm" fo:margin-right="0cm" fo:margin-top="0.362cm" fo:margin-bottom="0cm" fo:text-indent="0cm"/>
      <style:text-properties fo:font-size="14pt" style:font-size-asian="14pt" style:font-size-complex="14pt"/>
    </style:style>
    <style:style style:name="Two-thirds-outline4" style:family="presentation" style:parent-style-name="Two-thirds-outline3">
      <style:paragraph-properties fo:margin-left="0cm" fo:margin-right="0cm" fo:margin-top="0.241cm" fo:margin-bottom="0cm" fo:text-indent="0cm"/>
      <style:text-properties fo:font-size="12pt" fo:font-style="italic" style:font-size-asian="12pt" style:font-style-asian="italic" style:font-size-complex="12pt" style:font-style-complex="italic"/>
    </style:style>
    <style:style style:name="Two-thirds-outline5" style:family="presentation" style:parent-style-name="Two-thirds-outline4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Two-thirds-outline6" style:family="presentation" style:parent-style-name="Two-thirds-outline5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Two-thirds-outline7" style:family="presentation" style:parent-style-name="Two-thirds-outline6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Two-thirds-outline8" style:family="presentation" style:parent-style-name="Two-thirds-outline7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Two-thirds-outline9" style:family="presentation" style:parent-style-name="Two-thirds-outline8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Two-thirds-subtitle" style:family="presentation">
      <style:graphic-properties draw:stroke="none" draw:fill="none" draw:textarea-vertical-align="middle">
        <text:list-style style:name="Two-third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-thirds-title" style:family="presentation">
      <style:graphic-properties draw:stroke="none" draw:fill="none" draw:textarea-vertical-align="middle">
        <text:list-style style:name="Two-third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0504d" loext:opacity="100%" style:text-outline="false" style:text-line-through-style="none" style:text-line-through-type="none" style:font-name="Leelawadee" fo:font-family="Leelawadee" style:font-pitch="variable" fo:font-size="3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normal" style:font-name-complex="Noto Sans2" style:font-family-complex="'Noto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_31__5f_Two_20_left_20_Conent-background" style:display-name="1_Two left Conent-background" style:family="presentation">
      <style:graphic-properties draw:stroke="none" draw:fill="none"/>
      <style:text-properties style:letter-kerning="true"/>
    </style:style>
    <style:style style:name="_31__5f_Two_20_left_20_Conent-backgroundobjects" style:display-name="1_Two left Con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wo_20_left_20_Conent-notes" style:display-name="1_Two left Con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wo_20_left_20_Conent-outline1" style:display-name="1_Two left Conent-outline1" style:family="presentation">
      <style:graphic-properties draw:stroke="none" draw:fill="none" draw:auto-grow-height="false" draw:fit-to-size="false" style:shrink-to-fit="true">
        <text:list-style style:name="_31__5f_Two_20_left_20_Conent-outline1" style:display-name="1_Two left Con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2" style:font-family-complex="'Noto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Two_20_left_20_Conent-outline2" style:display-name="1_Two left Conent-outline2" style:family="presentation" style:parent-style-name="_31__5f_Two_20_left_20_Conent-outline1">
      <style:paragraph-properties fo:margin-left="0cm" fo:margin-right="0cm" fo:margin-top="0.483cm" fo:margin-bottom="0cm" fo:text-indent="0cm"/>
      <style:text-properties fo:font-size="18pt" style:font-size-asian="18pt" style:font-size-complex="18pt"/>
    </style:style>
    <style:style style:name="_31__5f_Two_20_left_20_Conent-outline3" style:display-name="1_Two left Conent-outline3" style:family="presentation" style:parent-style-name="_31__5f_Two_20_left_20_Conent-outline2">
      <style:paragraph-properties fo:margin-left="0cm" fo:margin-right="0cm" fo:margin-top="0.362cm" fo:margin-bottom="0cm" fo:text-indent="0cm"/>
      <style:text-properties fo:font-size="14pt" style:font-size-asian="14pt" style:font-size-complex="14pt"/>
    </style:style>
    <style:style style:name="_31__5f_Two_20_left_20_Conent-outline4" style:display-name="1_Two left Conent-outline4" style:family="presentation" style:parent-style-name="_31__5f_Two_20_left_20_Conent-outline3">
      <style:paragraph-properties fo:margin-left="0cm" fo:margin-right="0cm" fo:margin-top="0.241cm" fo:margin-bottom="0cm" fo:text-indent="0cm"/>
      <style:text-properties fo:font-size="12pt" fo:font-style="italic" style:font-size-asian="12pt" style:font-style-asian="italic" style:font-size-complex="12pt" style:font-style-complex="italic"/>
    </style:style>
    <style:style style:name="_31__5f_Two_20_left_20_Conent-outline5" style:display-name="1_Two left Conent-outline5" style:family="presentation" style:parent-style-name="_31__5f_Two_20_left_20_Conent-outline4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_31__5f_Two_20_left_20_Conent-outline6" style:display-name="1_Two left Conent-outline6" style:family="presentation" style:parent-style-name="_31__5f_Two_20_left_20_Conent-outline5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_31__5f_Two_20_left_20_Conent-outline7" style:display-name="1_Two left Conent-outline7" style:family="presentation" style:parent-style-name="_31__5f_Two_20_left_20_Conent-outline6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_31__5f_Two_20_left_20_Conent-outline8" style:display-name="1_Two left Conent-outline8" style:family="presentation" style:parent-style-name="_31__5f_Two_20_left_20_Conent-outline7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_31__5f_Two_20_left_20_Conent-outline9" style:display-name="1_Two left Conent-outline9" style:family="presentation" style:parent-style-name="_31__5f_Two_20_left_20_Conent-outline8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_31__5f_Two_20_left_20_Conent-subtitle" style:display-name="1_Two left Conent-subtitle" style:family="presentation">
      <style:graphic-properties draw:stroke="none" draw:fill="none" draw:textarea-vertical-align="middle">
        <text:list-style style:name="_31__5f_Two_20_left_20_Conent-subtitle" style:display-name="1_Two left Con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left_20_Conent-title" style:display-name="1_Two left Conent-title" style:family="presentation">
      <style:graphic-properties draw:stroke="none" draw:fill="none" draw:textarea-vertical-align="middle">
        <text:list-style style:name="_31__5f_Two_20_left_20_Conent-title" style:display-name="1_Two left Con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0504d" loext:opacity="100%" style:text-outline="false" style:text-line-through-style="none" style:text-line-through-type="none" style:font-name="Leelawadee" fo:font-family="Leelawadee" style:font-pitch="variable" fo:font-size="3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normal" style:font-name-complex="Noto Sans2" style:font-family-complex="'Noto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000000" draw:textarea-horizontal-align="justify" draw:textarea-vertical-align="middle" draw:auto-grow-height="false" draw:fit-to-size="false" style:shrink-to-fit="false" fo:min-height="11.293cm" fo:min-width="0.107cm" fo:padding-top="0.125cm" fo:padding-bottom="0.125cm" fo:padding-left="0.25cm" fo:padding-right="0.25cm" fo:wrap-option="wrap" loext:decorative="false">
        <loext:fill-complex-color loext:theme-type="dark1" loext:color-type="theme"/>
      </style:graphic-properties>
    </style:style>
    <style:style style:name="Mgr4" style:family="graphic" style:parent-style-name="standard">
      <style:graphic-properties draw:stroke="none" svg:stroke-width="0.071cm" svg:stroke-linecap="butt" draw:fill="solid" draw:fill-color="#d1282e" draw:textarea-horizontal-align="justify" draw:textarea-vertical-align="middle" draw:auto-grow-height="false" draw:fit-to-size="false" style:shrink-to-fit="false" fo:min-height="7.258cm" fo:min-width="0.107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solid" svg:stroke-width="0.053cm" svg:stroke-color="#c0000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One_20_Up_20_Conten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One_20_Up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One_20_Up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wo_20_left_20_Conen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Two-third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_31__5f_Two_20_left_20_Conen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b2b2b2" loext:opacity="100%" style:font-name="Liberation Sans1" fo:font-size="12pt" style:font-size-asian="12pt" style:font-size-complex="12pt"/>
    </style:style>
    <style:style style:name="MP6" style:family="paragraph">
      <loext:graphic-properties draw:fill="none" draw:fill-color="#ffffff"/>
      <style:paragraph-properties fo:text-align="center"/>
      <style:text-properties fo:color="#b2b2b2" loext:opacity="100%" style:font-name="Liberation Sans1" fo:font-size="12pt" style:font-size-asian="12pt" style:font-size-complex="12pt"/>
    </style:style>
    <style:style style:name="MP7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8" style:family="paragraph">
      <loext:graphic-properties draw:fill="solid" draw:fill-color="#d1282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b2b2" loext:opacity="100%" style:font-name="Liberation Sans1" fo:font-size="12pt" style:font-size-asian="12pt" style:font-size-complex="12pt"/>
    </style:style>
    <style:style style:name="MT3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One_20_Up_20_Content" style:display-name="One Up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Up_20_Content-title" draw:layer="backgroundobjects" svg:width="26.54cm" svg:height="1.57cm" svg:x="2.46cm" svg:y="1.02cm" presentation:class="title" presentation:placeholder="true">
        <draw:text-box/>
      </draw:frame>
      <draw:frame presentation:style-name="One_20_Up_20_Content-outline1" draw:layer="backgroundobjects" svg:width="30.478cm" svg:height="12.543cm" svg:x="1.693cm" svg:y="4.457cm" presentation:class="outline" presentation:placeholder="true">
        <draw:text-box/>
      </draw:frame>
      <draw:frame presentation:style-name="Mpr1" draw:text-style-name="MP6" draw:layer="backgroundobjects" svg:width="10.6cm" svg:height="1.11cm" svg:x="0.1cm" svg:y="17.94cm" presentation:class="footer">
        <draw:text-box>
          <text:p text:style-name="MP5"><text:span text:style-name="MT2">© 2026 by Innovation In Software Corporation</text:span></text:p>
        </draw:text-box>
      </draw:frame>
      <draw:custom-shape draw:name="Rectangle 2" draw:style-name="Mgr3" draw:text-style-name="MP7" draw:layer="backgroundobjects" svg:width="0.606cm" svg:height="11.542cm" svg:x="33.307cm" svg:y="7.507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8" draw:layer="backgroundobjects" svg:width="0.606cm" svg:height="7.507cm" svg:x="33.307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5" draw:text-style-name="MP10" draw:layer="backgroundobjects" svg:width="2.122cm" svg:height="0.763cm" draw:transform="rotate (1.5707963267949) translate (32.537cm 20.114cm)">
        <text:p text:style-name="MP9"><text:span text:style-name="MT3"><text:page-number>&lt;number&gt;</text:page-number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One_20_Up_20_Content-title" draw:layer="backgroundobjects" svg:width="18.624cm" svg:height="10.476cm" svg:x="1.482cm" svg:y="2.123cm" presentation:class="page"/>
        <draw:frame presentation:style-name="One_20_Up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left_20_Conent" style:display-name="Two left Conen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left_20_Conent-title" draw:layer="backgroundobjects" svg:width="26.54cm" svg:height="1.57cm" svg:x="2.46cm" svg:y="1.02cm" presentation:class="title" presentation:placeholder="true">
        <draw:text-box/>
      </draw:frame>
      <draw:frame presentation:style-name="Two_20_left_20_Conent-outline1" draw:layer="backgroundobjects" svg:width="13.807cm" svg:height="12.543cm" svg:x="1.693cm" svg:y="4.457cm" presentation:class="outline" presentation:placeholder="true">
        <draw:text-box/>
      </draw:frame>
      <draw:frame presentation:style-name="Mpr4" draw:text-style-name="MP6" draw:layer="backgroundobjects" svg:width="10.6cm" svg:height="1.11cm" svg:x="0.1cm" svg:y="17.94cm" presentation:class="footer">
        <draw:text-box>
          <text:p text:style-name="MP5"><text:span text:style-name="MT2">© 2026 by Innovation In Software Corporation</text:span></text:p>
        </draw:text-box>
      </draw:frame>
      <draw:custom-shape draw:name="Rectangle 2" draw:style-name="Mgr3" draw:text-style-name="MP7" draw:layer="backgroundobjects" svg:width="0.606cm" svg:height="11.542cm" svg:x="33.307cm" svg:y="7.507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8" draw:layer="backgroundobjects" svg:width="0.606cm" svg:height="7.507cm" svg:x="33.307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6" draw:text-style-name="MP10" draw:layer="backgroundobjects" svg:width="2.122cm" svg:height="0.763cm" draw:transform="rotate (1.5707963267949) translate (32.537cm 20.114cm)">
        <text:p text:style-name="MP9"><text:span text:style-name="MT3"><text:page-number>&lt;number&gt;</text:page-number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1" draw:style-name="Mgr7" draw:text-style-name="MP11" draw:layer="backgroundobjects" draw:type="line" svg:x1="16.011cm" svg:y1="4.46cm" svg:x2="16.011cm" svg:y2="17cm" svg:d="M16011 4460v12540" svg:viewBox="0 0 1 12541">
        <text:p/>
      </draw:connector>
      <presentation:notes style:page-layout-name="PM0">
        <draw:page-thumbnail presentation:style-name="Two_20_left_20_Conent-title" draw:layer="backgroundobjects" svg:width="18.624cm" svg:height="10.476cm" svg:x="1.482cm" svg:y="2.123cm" presentation:class="page"/>
        <draw:frame presentation:style-name="Two_20_left_20_Conen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wo-third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-thirds-title" draw:layer="backgroundobjects" svg:width="26.54cm" svg:height="1.57cm" svg:x="2.46cm" svg:y="1.02cm" presentation:class="title" presentation:placeholder="true">
        <draw:text-box/>
      </draw:frame>
      <draw:frame presentation:style-name="Two-thirds-outline1" draw:layer="backgroundobjects" svg:width="18.807cm" svg:height="12.543cm" svg:x="1.693cm" svg:y="4.457cm" presentation:class="outline" presentation:placeholder="true">
        <draw:text-box/>
      </draw:frame>
      <draw:frame presentation:style-name="Mpr5" draw:text-style-name="MP6" draw:layer="backgroundobjects" svg:width="10.6cm" svg:height="1.11cm" svg:x="0.1cm" svg:y="17.94cm" presentation:class="footer">
        <draw:text-box>
          <text:p text:style-name="MP5"><text:span text:style-name="MT2">© 2026 by Innovation In Software Corporation</text:span></text:p>
        </draw:text-box>
      </draw:frame>
      <draw:custom-shape draw:name="Rectangle 2" draw:style-name="Mgr3" draw:text-style-name="MP7" draw:layer="backgroundobjects" svg:width="0.606cm" svg:height="11.542cm" svg:x="33.307cm" svg:y="7.507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8" draw:layer="backgroundobjects" svg:width="0.606cm" svg:height="7.507cm" svg:x="33.307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8" draw:text-style-name="MP10" draw:layer="backgroundobjects" svg:width="2.122cm" svg:height="0.763cm" draw:transform="rotate (1.5707963267949) translate (32.537cm 20.114cm)">
        <text:p text:style-name="MP9"><text:span text:style-name="MT3"><text:page-number>&lt;number&gt;</text:page-number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1" draw:style-name="Mgr7" draw:text-style-name="MP11" draw:layer="backgroundobjects" draw:type="line" svg:x1="21.011cm" svg:y1="4.46cm" svg:x2="21.011cm" svg:y2="17cm" svg:d="M21011 4460v12540" svg:viewBox="0 0 1 12541">
        <text:p/>
      </draw:connector>
      <presentation:notes style:page-layout-name="PM0">
        <draw:page-thumbnail presentation:style-name="Two-thirds-title" draw:layer="backgroundobjects" svg:width="18.624cm" svg:height="10.476cm" svg:x="1.482cm" svg:y="2.123cm" presentation:class="page"/>
        <draw:frame presentation:style-name="Two-thirds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_31__5f_Two_20_left_20_Conent" style:display-name="1_Two left Conen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1__5f_Two_20_left_20_Conent-title" draw:layer="backgroundobjects" svg:width="26.54cm" svg:height="1.57cm" svg:x="2.46cm" svg:y="1.02cm" presentation:class="title" presentation:placeholder="true">
        <draw:text-box/>
      </draw:frame>
      <draw:frame presentation:style-name="_31__5f_Two_20_left_20_Conent-outline1" draw:layer="backgroundobjects" svg:width="13.807cm" svg:height="12.543cm" svg:x="1.693cm" svg:y="4.457cm" presentation:class="outline" presentation:placeholder="true">
        <draw:text-box/>
      </draw:frame>
      <draw:frame presentation:style-name="Mpr6" draw:text-style-name="MP6" draw:layer="backgroundobjects" svg:width="10.6cm" svg:height="1.11cm" svg:x="0.1cm" svg:y="17.94cm" presentation:class="footer">
        <draw:text-box>
          <text:p text:style-name="MP5"><text:span text:style-name="MT2">© 2026 by Innovation In Software Corporation</text:span></text:p>
        </draw:text-box>
      </draw:frame>
      <draw:custom-shape draw:name="Rectangle 2" draw:style-name="Mgr3" draw:text-style-name="MP7" draw:layer="backgroundobjects" svg:width="0.606cm" svg:height="11.542cm" svg:x="33.307cm" svg:y="7.507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8" draw:layer="backgroundobjects" svg:width="0.606cm" svg:height="7.507cm" svg:x="33.307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9" draw:text-style-name="MP10" draw:layer="backgroundobjects" svg:width="2.122cm" svg:height="0.763cm" draw:transform="rotate (1.5707963267949) translate (32.537cm 20.114cm)">
        <text:p text:style-name="MP9"><text:span text:style-name="MT3"><text:page-number>&lt;number&gt;</text:page-number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1" draw:style-name="Mgr7" draw:text-style-name="MP11" draw:layer="backgroundobjects" draw:type="line" svg:x1="16.011cm" svg:y1="4.46cm" svg:x2="16.011cm" svg:y2="17cm" svg:d="M16011 4460v12540" svg:viewBox="0 0 1 12541">
        <text:p/>
      </draw:connector>
      <presentation:notes style:page-layout-name="PM0">
        <draw:page-thumbnail presentation:style-name="_31__5f_Two_20_left_20_Conent-title" draw:layer="backgroundobjects" svg:width="18.624cm" svg:height="10.476cm" svg:x="1.482cm" svg:y="2.123cm" presentation:class="page"/>
        <draw:frame presentation:style-name="_31__5f_Two_20_left_20_Conen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2:30:46.005905264</meta:creation-date>
    <dc:date>2026-03-11T12:13:30.685428547</dc:date>
    <meta:editing-duration>P1DT12H6M45S</meta:editing-duration>
    <meta:editing-cycles>59</meta:editing-cycles>
    <meta:generator>LibreOffice/25.8.4.2$Linux_X86_64 LibreOffice_project/290daaa01b999472f0c7a3890eb6a550fd74c6df</meta:generator>
    <dc:subject>Java Full Stack</dc:subject>
    <dc:title>5. IntelliJ Setup and Navigation</dc:title>
    <dc:contributor>Rod Davison</dc:contributor>
    <meta:document-statistic meta:object-count="232"/>
  </office:meta>
</office:document-meta>
</file>